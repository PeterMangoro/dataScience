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4.1972in" table:align="left"/>
    </style:style>
    <style:style style:name="Table1.A" style:family="table-column">
      <style:table-column-properties style:column-width="0.9111in"/>
    </style:style>
    <style:style style:name="Table1.B" style:family="table-column">
      <style:table-column-properties style:column-width="0.7493in"/>
    </style:style>
    <style:style style:name="Table1.C" style:family="table-column">
      <style:table-column-properties style:column-width="0.7833in"/>
    </style:style>
    <style:style style:name="Table1.D" style:family="table-column">
      <style:table-column-properties style:column-width="0.825in"/>
    </style:style>
    <style:style style:name="Table1.E" style:family="table-column">
      <style:table-column-properties style:column-width="0.9285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top="0in" fo:margin-bottom="0.1965in" style:contextual-spacing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Heading">
      <style:paragraph-properties fo:margin-top="0in" fo:margin-bottom="0.1965in" style:contextual-spacing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margin-top="0in" fo:margin-bottom="0.1965in" style:contextual-spacing="false"/>
    </style:style>
    <style:style style:name="P5" style:family="paragraph" style:parent-style-name="Text_20_body">
      <style:text-properties officeooo:paragraph-rsid="0022e133"/>
    </style:style>
    <style:style style:name="P6" style:family="paragraph" style:parent-style-name="Heading_20_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Heading_20_2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Heading_20_2">
      <style:text-properties style:font-name="Times New Roman" fo:font-size="12pt" fo:font-weight="bold" officeooo:paragraph-rsid="0028dde3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in" fo:margin-bottom="0.1965in" style:contextual-spacing="false"/>
    </style:style>
    <style:style style:name="P10" style:family="paragraph" style:parent-style-name="Table_20_Contents">
      <style:paragraph-properties fo:margin-top="0in" fo:margin-bottom="0.1965in" style:contextual-spacing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able_20_Heading">
      <style:paragraph-properties fo:margin-top="0in" fo:margin-bottom="0.1965in" style:contextual-spacing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 style:list-style-name="L2"/>
    <style:style style:name="P14" style:family="paragraph" style:parent-style-name="Text_20_body">
      <style:text-properties officeooo:paragraph-rsid="0023f87b"/>
    </style:style>
    <style:style style:name="P15" style:family="paragraph" style:parent-style-name="Text_20_body" style:list-style-name="L3">
      <style:text-properties officeooo:paragraph-rsid="0023f87b"/>
    </style:style>
    <style:style style:name="P16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text-properties officeooo:paragraph-rsid="0028dde3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Times New Roman" fo:font-size="12pt" fo:font-weight="normal" officeooo:rsid="0023f87b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28dde3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Assignment 3 Report: Representation Learning and Sequence Modeling (Online Retail)</text:h>
      <text:h text:style-name="P1" text:outline-level="2">Problem and data (what this study is about)</text:h>
      <text:p text:style-name="Text_20_body"><text:span text:style-name="T1">The </text:span><text:span text:style-name="Strong_20_Emphasis"><text:span text:style-name="T1">Online Retail</text:span></text:span><text:span text:style-name="T1"> dataset (UCI / Kaggle) is </text:span><text:span text:style-name="Strong_20_Emphasis"><text:span text:style-name="T1">invoice line items</text:span></text:span><text:span text:style-name="T1">: each row is one product on an order (</text:span><text:span text:style-name="Source_20_Text"><text:span text:style-name="T1">StockCode</text:span></text:span><text:span text:style-name="T1">, quantities, prices, timestamps, </text:span><text:span text:style-name="Source_20_Text"><text:span text:style-name="T1">CustomerID</text:span></text:span><text:span text:style-name="T1">). The task is </text:span><text:span text:style-name="Strong_20_Emphasis"><text:span text:style-name="T1">customer-level</text:span></text:span><text:span text:style-name="T1">: find </text:span><text:span text:style-name="Strong_20_Emphasis"><text:span text:style-name="T1">hidden groups</text:span></text:span><text:span text:style-name="T1"> of shoppers without using a hand-made label, then train </text:span><text:span text:style-name="Strong_20_Emphasis"><text:span text:style-name="T1">neural sequence models</text:span></text:span><text:span text:style-name="T1"> that read a customer’s purchase history and predict outcomes of interest.</text:span></text:p>
      <text:h text:style-name="P1" text:outline-level="2">Representation design and justification</text:h>
      <text:p text:style-name="Text_20_body"><text:span text:style-name="Strong_20_Emphasis"><text:span text:style-name="T1">Unit of analysis, </text:span></text:span><text:span text:style-name="Strong_20_Emphasis"><text:span text:style-name="T7">e</text:span></text:span><text:span text:style-name="T1">ach </text:span><text:span text:style-name="Strong_20_Emphasis"><text:span text:style-name="T1">customer</text:span></text:span><text:span text:style-name="T1"> is one example. Their </text:span><text:span text:style-name="Strong_20_Emphasis"><text:span text:style-name="T1">sequence</text:span></text:span><text:span text:style-name="T1"> is the time-ordered list of their purchase events (after cleaning invalid rows and restricting to customers used in modeling).</text:span></text:p>
      <text:p text:style-name="P17"><text:span text:style-name="T1">At each position in the sequence the model sees a </text:span><text:span text:style-name="Strong_20_Emphasis"><text:span text:style-name="T1">categorical token</text:span></text:span><text:span text:style-name="T1"> for the product (</text:span><text:span text:style-name="Source_20_Text"><text:span text:style-name="T1">StockCode</text:span></text:span><text:span text:style-name="T1">) and </text:span><text:span text:style-name="Strong_20_Emphasis"><text:span text:style-name="T1">numeric context</text:span></text:span><text:span text:style-name="T1"> for that line, </text:span><text:span text:style-name="Source_20_Text"><text:span text:style-name="T1">Quantity</text:span></text:span><text:span text:style-name="T1">, </text:span><text:span text:style-name="Source_20_Text"><text:span text:style-name="T1">UnitPrice</text:span></text:span><text:span text:style-name="T1">, and line amount, </text:span><text:span text:style-name="Strong_20_Emphasis"><text:span text:style-name="T1">standardized using train-split means and standard deviations</text:span></text:span><text:span text:style-name="T1"> so scale does not dominate learning.</text:span></text:p>
      <text:p text:style-name="Text_20_body"><text:span text:style-name="T1">Sequences are </text:span><text:span text:style-name="Strong_20_Emphasis"><text:span text:style-name="T1">truncated</text:span></text:span><text:span text:style-name="T1"> to a maximum length chosen from the data (about the </text:span><text:span text:style-name="Strong_20_Emphasis"><text:span text:style-name="T1">95th percentile of sequence length</text:span></text:span><text:span text:style-name="T1">, capped at </text:span><text:span text:style-name="Strong_20_Emphasis"><text:span text:style-name="T1">120</text:span></text:span><text:span text:style-name="T1"> events). Shorter sequences are </text:span><text:span text:style-name="Strong_20_Emphasis"><text:span text:style-name="T1">padded</text:span></text:span><text:span text:style-name="T1">; a mask tells the model which positions are real events vs padding.</text:span></text:p>
      <text:p text:style-name="Text_20_body"><text:span text:style-name="Strong_20_Emphasis"><text:span text:style-name="T1">Three customer-level tables for clustering.</text:span></text:span><text:span text:style-name="T1"> </text:span><text:span text:style-name="Source_20_Text"><text:span text:style-name="T1">raw</text:span></text:span><text:span text:style-name="Strong_20_Emphasis"><text:span text:style-name="T1">:</text:span></text:span><text:span text:style-name="T1"> aggregates (frequency, spend, recency, etc.). </text:span><text:span text:style-name="Source_20_Text"><text:span text:style-name="T1">sequence</text:span></text:span><text:span text:style-name="Strong_20_Emphasis"><text:span text:style-name="T1">:</text:span></text:span><text:span text:style-name="T1"> raw </text:span><text:span text:style-name="Strong_20_Emphasis"><text:span text:style-name="T1">plus</text:span></text:span><text:span text:style-name="T1"> simple dynamics (e.g. spread of basket size, gaps between orders). </text:span><text:span text:style-name="Source_20_Text"><text:span text:style-name="T1">latent</text:span></text:span><text:span text:style-name="Strong_20_Emphasis"><text:span text:style-name="T1">:</text:span></text:span><text:span text:style-name="T1"> standardized sequence features → </text:span><text:span text:style-name="Strong_20_Emphasis"><text:span text:style-name="T1">PCA</text:span></text:span><text:span text:style-name="T1"> (</text:span><text:span text:style-name="Strong_20_Emphasis"><text:span text:style-name="T1">7</text:span></text:span><text:span text:style-name="T1"> components, </text:span><text:span text:style-name="Strong_20_Emphasis"><text:span text:style-name="T1">≈0.95</text:span></text:span><text:span text:style-name="T1"> explained variance) </text:span><text:span text:style-name="Strong_20_Emphasis"><text:span text:style-name="T1">plus</text:span></text:span><text:span text:style-name="T1"> light K-means metadata (cluster id and distance to centroid) appended for that representation only.</text:span></text:p>
      <text:p text:style-name="Text_20_body"><text:span text:style-name="T1">Aggregates are stable summaries; sequence fields add </text:span><text:span text:style-name="Strong_20_Emphasis"><text:span text:style-name="T1">cadence and variability</text:span></text:span><text:span text:style-name="T1">; PCA removes redundancy before K-means. </text:span><text:span text:style-name="Strong_20_Emphasis"><text:span text:style-name="T1">Supervised models</text:span></text:span><text:span text:style-name="T1"> use </text:span><text:span text:style-name="Strong_20_Emphasis"><text:span text:style-name="T1">event sequences</text:span></text:span><text:span text:style-name="T1"> (tokens + line numerics); </text:span><text:span text:style-name="Strong_20_Emphasis"><text:span text:style-name="T1">labels</text:span></text:span><text:span text:style-name="T1"> come from the latent </text:span><text:span text:style-name="Strong_20_Emphasis"><text:span text:style-name="T1">k = 6</text:span></text:span><text:span text:style-name="T1"> clustering below—not from reading the aggregate tables directly.</text:span></text:p>
      <text:h text:style-name="P1" text:outline-level="2">Unsupervised learning</text:h>
      <text:p text:style-name="Text_20_body"><text:span text:style-name="Strong_20_Emphasis"><text:span text:style-name="T1">K-means</text:span></text:span><text:span text:style-name="T1"> for </text:span><text:span text:style-name="Strong_20_Emphasis"><text:span text:style-name="T1">k = 2 … 8</text:span></text:span><text:span text:style-name="T1"> on each family. </text:span><text:span text:style-name="Strong_20_Emphasis"><text:span text:style-name="T1">Silhouette</text:span></text:span><text:span text:style-name="T1"> (higher = tighter, well-separated clusters) drove </text:span><text:span text:style-name="Strong_20_Emphasis"><text:span text:style-name="T1">k</text:span></text:span><text:span text:style-name="T1"> choice, with </text:span><text:span text:style-name="Strong_20_Emphasis"><text:span text:style-name="T1">Calinski–Harabasz</text:span></text:span><text:span text:style-name="T1">, </text:span><text:span text:style-name="Strong_20_Emphasis"><text:span text:style-name="T1">Davies–Bouldin</text:span></text:span><text:span text:style-name="T1">, and </text:span><text:span text:style-name="Strong_20_Emphasis"><text:span text:style-name="T1">inertia</text:span></text:span><text:span text:style-name="T1"> as backup metrics.</text:span></text:p>
      <text:p text:style-name="Text_20_body"><text:span text:style-name="T1">On </text:span><text:span text:style-name="Source_20_Text"><text:span text:style-name="T1">raw</text:span></text:span><text:span text:style-name="T1"> and </text:span><text:span text:style-name="Source_20_Text"><text:span text:style-name="T1">sequence</text:span></text:span><text:span text:style-name="T1">, the best silhouette often occurred at </text:span><text:span text:style-name="Strong_20_Emphasis"><text:span text:style-name="T1">k = 2</text:span></text:span><text:span text:style-name="T1">, but </text:span><text:span text:style-name="Strong_20_Emphasis"><text:span text:style-name="T1">cluster sizes</text:span></text:span><text:span text:style-name="T1"> were </text:span><text:span text:style-name="Strong_20_Emphasis"><text:span text:style-name="T1">extremely skewed</text:span></text:span><text:span text:style-name="T1">: one very large “normal” cluster and a </text:span><text:span text:style-name="Strong_20_Emphasis"><text:span text:style-name="T1">tiny</text:span></text:span><text:span text:style-name="T1"> second cluster. That pattern usually means </text:span><text:span text:style-name="Strong_20_Emphasis"><text:span text:style-name="T1">“inliers vs outliers”</text:span></text:span><text:span text:style-name="T1"> rather than a rich set of customer personas. On </text:span><text:span text:style-name="Source_20_Text"><text:span text:style-name="T1">latent</text:span></text:span><text:span text:style-name="T1">, a choice of </text:span><text:span text:style-name="Strong_20_Emphasis"><text:span text:style-name="T1">k = 6</text:span></text:span><text:span text:style-name="T1"> gave a </text:span><text:span text:style-name="Strong_20_Emphasis"><text:span text:style-name="T1">more balanced multi-cluster</text:span></text:span><text:span text:style-name="T1"> picture (still imbalanced, but not a single dominant-vs-dust split).</text:span></text:p>
      <text:p text:style-name="Text_20_body"><text:span text:style-name="Strong_20_Emphasis"><text:span text:style-name="T1">Class proportions used as supervised labels</text:span></text:span><text:span text:style-name="T1"> (from the latent </text:span><text:span text:style-name="Strong_20_Emphasis"><text:span text:style-name="T1">k = 6</text:span></text:span><text:span text:style-name="T1"> solution, encoded as classes 0–5): roughly </text:span><text:span text:style-name="Strong_20_Emphasis"><text:span text:style-name="T1">46% / 36%</text:span></text:span><text:span text:style-name="T1"> in the two largest groups, </text:span><text:span text:style-name="Strong_20_Emphasis"><text:span text:style-name="T1">≈8%</text:span></text:span><text:span text:style-name="T1"> each in the next two, </text:span><text:span text:style-name="Strong_20_Emphasis"><text:span text:style-name="T1">≈0.6%</text:span></text:span><text:span text:style-name="T1"> in the fifth, and </text:span><text:span text:style-name="Strong_20_Emphasis"><text:span text:style-name="T1">≈0.05%</text:span></text:span><text:span text:style-name="T1"> in the smallest, so downstream classification is </text:span><text:span text:style-name="Strong_20_Emphasis"><text:span text:style-name="T1">strongly imbalanced</text:span></text:span><text:span text:style-name="T1">.</text:span></text:p>
      <text:p text:style-name="P17"><text:span text:style-name="Strong_20_Emphasis"><text:span text:style-name="T1">Second method </text:span></text:span><text:span text:style-name="Strong_20_Emphasis"><text:span text:style-name="T7">for </text:span></text:span><text:span text:style-name="Strong_20_Emphasis"><text:span text:style-name="T1">sanity check,</text:span></text:span><text:span text:style-name="T1"> </text:span><text:span text:style-name="Strong_20_Emphasis"><text:span text:style-name="T1">Ward agglomerative</text:span></text:span><text:span text:style-name="T1"> on the </text:span><text:span text:style-name="Strong_20_Emphasis"><text:span text:style-name="T1">same latent matrix</text:span></text:span><text:span text:style-name="T1"> at </text:span><text:span text:style-name="Strong_20_Emphasis"><text:span text:style-name="T1">k = 6</text:span></text:span><text:span text:style-name="T1">. </text:span><text:span text:style-name="Strong_20_Emphasis"><text:span text:style-name="T1">Compared to</text:span></text:span><text:span text:style-name="T1"> K-means labels: </text:span><text:span text:style-name="Strong_20_Emphasis"><text:span text:style-name="T1">ARI = 0.942755</text:span></text:span><text:span text:style-name="T1">, </text:span><text:span text:style-name="Strong_20_Emphasis"><text:span text:style-name="T1">NMI = 0.884462</text:span></text:span><text:span text:style-name="T1">; silhouette </text:span><text:span text:style-name="Strong_20_Emphasis"><text:span text:style-name="T1">0.380240</text:span></text:span><text:span text:style-name="T1"> vs </text:span><text:span text:style-name="Strong_20_Emphasis"><text:span text:style-name="T1">0.368773</text:span></text:span><text:span text:style-name="T1">—partitions match up to </text:span><text:span text:style-name="Strong_20_Emphasis"><text:span text:style-name="T1">renaming clusters</text:span></text:span><text:span text:style-name="T1">, so the six-way split is </text:span><text:span text:style-name="Strong_20_Emphasis"><text:span text:style-name="T1">stable</text:span></text:span><text:span text:style-name="T1">, not a K-means quirk. K-means stays primary for the </text:span><text:span text:style-name="Strong_20_Emphasis"><text:span text:style-name="T1">k grid</text:span></text:span><text:span text:style-name="T1"> and speed; usual caveats: </text:span><text:span text:style-name="Strong_20_Emphasis"><text:span text:style-name="T1">choose k</text:span></text:span><text:span text:style-name="T1">, </text:span><text:span text:style-name="Strong_20_Emphasis"><text:span text:style-name="T1">outliers</text:span></text:span><text:span text:style-name="T1">, roughly </text:span><text:span text:style-name="Strong_20_Emphasis"><text:span text:style-name="T1">spherical</text:span></text:span><text:span text:style-name="T1"> groups.</text:span></text:p>
      <text:h text:style-name="P8" text:outline-level="2"><text:soft-page-break/>Supervised task, models, and training behavior</text:h>
      <text:p text:style-name="Text_20_body"><text:span text:style-name="T1">Each customer has a </text:span><text:span text:style-name="Strong_20_Emphasis"><text:span text:style-name="T1">segment label</text:span></text:span><text:span text:style-name="T1"> from the latent </text:span><text:span text:style-name="Strong_20_Emphasis"><text:span text:style-name="T1">k = 6</text:span></text:span><text:span text:style-name="T1"> clustering. The models read the </text:span><text:span text:style-name="Strong_20_Emphasis"><text:span text:style-name="T1">purchase sequence</text:span></text:span><text:span text:style-name="T1"> and try to </text:span><text:span text:style-name="Strong_20_Emphasis"><text:span text:style-name="T1">predict that label</text:span></text:span><text:span text:style-name="T1">. Intuitively: </text:span><text:span text:style-name="Emphasis"><text:span text:style-name="T1">if shopping patterns contain information about “customer type,” a sequence model should recover the same groups the clustering found from summaries.</text:span></text:span></text:p>
      <text:p text:style-name="Text_20_body"><text:span text:style-name="Strong_20_Emphasis"><text:span text:style-name="T1">Train / validation / test split.</text:span></text:span><text:span text:style-name="T1"> </text:span><text:span text:style-name="Strong_20_Emphasis"><text:span text:style-name="T1">4,338</text:span></text:span><text:span text:style-name="T1"> customers were split </text:span><text:span text:style-name="Strong_20_Emphasis"><text:span text:style-name="T1">without overlap</text:span></text:span><text:span text:style-name="T1"> (</text:span><text:span text:style-name="Strong_20_Emphasis"><text:span text:style-name="T1">≈70% / 15% / 15%</text:span></text:span><text:span text:style-name="T1"> → </text:span><text:span text:style-name="Strong_20_Emphasis"><text:span text:style-name="T1">3,036 / 651 / 651</text:span></text:span><text:span text:style-name="T1">) so no customer appears in more than one split. Product codes were mapped to integers using a vocabulary built from </text:span><text:span text:style-name="Strong_20_Emphasis"><text:span text:style-name="T1">training customers only</text:span></text:span><text:span text:style-name="T1"> (about </text:span><text:span text:style-name="Strong_20_Emphasis"><text:span text:style-name="T1">3,600</text:span></text:span><text:span text:style-name="T1"> tokens including special symbols) to avoid </text:span><text:span text:style-name="Strong_20_Emphasis"><text:span text:style-name="T1">leakage</text:span></text:span><text:span text:style-name="T1">.</text:span></text:p>
      <text:p text:style-name="Text_20_body"><text:span text:style-name="Strong_20_Emphasis"><text:span text:style-name="T1">Accuracy</text:span></text:span><text:span text:style-name="T1"> is the fraction of customers classified correctly. Under heavy imbalance it can be dominated by the largest classes, so we emphasize </text:span><text:span text:style-name="Strong_20_Emphasis"><text:span text:style-name="T1">macro-F1</text:span></text:span><text:span text:style-name="T1">: the </text:span><text:span text:style-name="Strong_20_Emphasis"><text:span text:style-name="T1">unweighted average</text:span></text:span><text:span text:style-name="T1"> of F1 across classes, so </text:span><text:span text:style-name="Strong_20_Emphasis"><text:span text:style-name="T1">rare segments count equally</text:span></text:span><text:span text:style-name="T1"> in the headline score.</text:span></text:p>
      <text:p text:style-name="Text_20_body"><text:span text:style-name="T1">A recurrent network with </text:span><text:span text:style-name="Strong_20_Emphasis"><text:span text:style-name="T1">token embeddings</text:span></text:span><text:span text:style-name="T1">, </text:span><text:span text:style-name="Strong_20_Emphasis"><text:span text:style-name="T1">numeric projections</text:span></text:span><text:span text:style-name="T1">, and a </text:span><text:span text:style-name="Strong_20_Emphasis"><text:span text:style-name="T1">pooled hidden state</text:span></text:span><text:span text:style-name="T1"> was trained with </text:span><text:span text:style-name="Strong_20_Emphasis"><text:span text:style-name="T1">cross-entropy</text:span></text:span><text:span text:style-name="T1">. Training loss decreased, but </text:span><text:span text:style-name="Strong_20_Emphasis"><text:span text:style-name="T1">validation loss</text:span></text:span><text:span text:style-name="T1"> and </text:span><text:span text:style-name="Strong_20_Emphasis"><text:span text:style-name="T1">macro-F1</text:span></text:span><text:span text:style-name="T1"> </text:span><text:span text:style-name="Strong_20_Emphasis"><text:span text:style-name="T1">flattened early</text:span></text:span><text:span text:style-name="T1">, which is classic </text:span><text:span text:style-name="Strong_20_Emphasis"><text:span text:style-name="T1">overfitting</text:span></text:span><text:span text:style-name="T1">; checkpoints favored </text:span><text:span text:style-name="Strong_20_Emphasis"><text:span text:style-name="T1">macro-F1</text:span></text:span><text:span text:style-name="T1"> on validation rather than raw accuracy. A </text:span><text:span text:style-name="Strong_20_Emphasis"><text:span text:style-name="T1">class-weighted</text:span></text:span><text:span text:style-name="T1"> loss variant </text:span><text:span text:style-name="Strong_20_Emphasis"><text:span text:style-name="T1">raised macro-F1</text:span></text:span><text:span text:style-name="T1"> (about </text:span><text:span text:style-name="Strong_20_Emphasis"><text:span text:style-name="T1">0.25 → 0.29</text:span></text:span><text:span text:style-name="T1">) at the cost of </text:span><text:span text:style-name="Strong_20_Emphasis"><text:span text:style-name="T1">lower accuracy</text:span></text:span><text:span text:style-name="T1"> (about </text:span><text:span text:style-name="Strong_20_Emphasis"><text:span text:style-name="T1">0.69 → 0.57</text:span></text:span><text:span text:style-name="T1">), showing an explicit </text:span><text:span text:style-name="Strong_20_Emphasis"><text:span text:style-name="T1">bias–variance / objective tradeoff</text:span></text:span><text:span text:style-name="T1">: weighting pushes the model away from always predicting the majority.</text:span></text:p>
      <text:p text:style-name="Text_20_body"><text:span text:style-name="T1">A small </text:span><text:span text:style-name="Strong_20_Emphasis"><text:span text:style-name="T1">multi-head self-attention</text:span></text:span><text:span text:style-name="T1"> encoder with the same inputs and pooling readout was trained under the </text:span><text:span text:style-name="Strong_20_Emphasis"><text:span text:style-name="T1">same protocol</text:span></text:span><text:span text:style-name="T1">. It also </text:span><text:span text:style-name="Strong_20_Emphasis"><text:span text:style-name="T1">overfit in loss</text:span></text:span><text:span text:style-name="T1"> (training loss kept improving while validation loss worsened after early epochs). Validation </text:span><text:span text:style-name="Strong_20_Emphasis"><text:span text:style-name="T1">macro-F1</text:span></text:span><text:span text:style-name="T1"> peaked around </text:span><text:span text:style-name="Strong_20_Emphasis"><text:span text:style-name="T1">0.33</text:span></text:span><text:span text:style-name="T1"> then plateaued—</text:span><text:span text:style-name="Strong_20_Emphasis"><text:span text:style-name="T1">better balanced performance</text:span></text:span><text:span text:style-name="T1"> than the unweighted GRU on this split, at the cost of more computation.</text:span></text:p>
      <text:p text:style-name="Text_20_body"><text:span text:style-name="T1">On </text:span><text:span text:style-name="Strong_20_Emphasis"><text:span text:style-name="T1">two test customers</text:span></text:span><text:span text:style-name="T1">, </text:span><text:span text:style-name="Strong_20_Emphasis"><text:span text:style-name="T1">head-averaged</text:span></text:span><text:span text:style-name="T1"> weights used the </text:span><text:span text:style-name="Strong_20_Emphasis"><text:span text:style-name="T1">last real line</text:span></text:span><text:span text:style-name="T1"> as </text:span><text:span text:style-name="Strong_20_Emphasis"><text:span text:style-name="T1">query</text:span></text:span><text:span text:style-name="T1">; </text:span><text:span text:style-name="Strong_20_Emphasis"><text:span text:style-name="T1">top-weighted earlier positions</text:span></text:span><text:span text:style-name="T1"> were mapped to </text:span><text:span text:style-name="Strong_20_Emphasis"><text:span text:style-name="T1">StockCodes</text:span></text:span><text:span text:style-name="T1"> and z-scored </text:span><text:span text:style-name="Strong_20_Emphasis"><text:span text:style-name="T1">Quantity / UnitPrice / amount</text:span></text:span><text:span text:style-name="T1">. Mass is </text:span><text:span text:style-name="Strong_20_Emphasis"><text:span text:style-name="T1">non-uniform</text:span></text:span><text:span text:style-name="T1"> over time (see notebook bar and heatmap figures)—consistent with </text:span><text:span text:style-name="Strong_20_Emphasis"><text:span text:style-name="T1">selective</text:span></text:span><text:span text:style-name="T1"> use of context, </text:span><text:span text:style-name="Strong_20_Emphasis"><text:span text:style-name="T1">not</text:span></text:span><text:span text:style-name="T1"> a causal explanation of the predicted segment.</text:span></text:p>
      <text:h text:style-name="P1" text:outline-level="2">Comparative conclusions (GRU vs Transformer, test set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Model</text:p>
          </table:table-cell>
          <table:table-cell table:style-name="Table1.A1" office:value-type="string">
            <text:p text:style-name="P3">Accuracy</text:p>
          </table:table-cell>
          <table:table-cell table:style-name="Table1.A1" office:value-type="string">
            <text:p text:style-name="P3">Macro-F1</text:p>
          </table:table-cell>
          <table:table-cell table:style-name="Table1.A1" office:value-type="string">
            <text:p text:style-name="P3">Train time</text:p>
          </table:table-cell>
          <table:table-cell table:style-name="Table1.E1" office:value-type="string">
            <text:p text:style-name="P3">Parameters</text:p>
          </table:table-cell>
        </table:table-row>
        <table:table-row>
          <table:table-cell table:style-name="Table1.A2" office:value-type="string">
            <text:p text:style-name="P2">Transformer</text:p>
          </table:table-cell>
          <table:table-cell table:style-name="Table1.A2" office:value-type="string">
            <text:p text:style-name="P2">0.5960</text:p>
          </table:table-cell>
          <table:table-cell table:style-name="Table1.A2" office:value-type="string">
            <text:p text:style-name="P4"><text:span text:style-name="Strong_20_Emphasis"><text:span text:style-name="T1">0.2946</text:span></text:span></text:p>
          </table:table-cell>
          <table:table-cell table:style-name="Table1.A2" office:value-type="string">
            <text:p text:style-name="P2">≈9.65 s</text:p>
          </table:table-cell>
          <table:table-cell table:style-name="Table1.E2" office:value-type="string">
            <text:p text:style-name="P2">292,566</text:p>
          </table:table-cell>
        </table:table-row>
        <table:table-row>
          <table:table-cell table:style-name="Table1.A2" office:value-type="string">
            <text:p text:style-name="P2">GRU</text:p>
          </table:table-cell>
          <table:table-cell table:style-name="Table1.A2" office:value-type="string">
            <text:p text:style-name="P4"><text:span text:style-name="Strong_20_Emphasis"><text:span text:style-name="T1">0.6851</text:span></text:span></text:p>
          </table:table-cell>
          <table:table-cell table:style-name="Table1.A2" office:value-type="string">
            <text:p text:style-name="P2">0.2498</text:p>
          </table:table-cell>
          <table:table-cell table:style-name="Table1.A2" office:value-type="string">
            <text:p text:style-name="P2">≈6.65 s</text:p>
          </table:table-cell>
          <table:table-cell table:style-name="Table1.E2" office:value-type="string">
            <text:p text:style-name="P2">288,326</text:p>
          </table:table-cell>
        </table:table-row>
      </table:table>
      <text:p text:style-name="Text_20_body"><text:span text:style-name="T1"/></text:p>
      <text:p text:style-name="Text_20_body"><text:span text:style-name="T1">The two models have </text:span><text:span text:style-name="Strong_20_Emphasis"><text:span text:style-name="T1">similar parameter counts</text:span></text:span><text:span text:style-name="T1">, so the gap is not mainly “more neurons” it is </text:span><text:span text:style-name="Strong_20_Emphasis"><text:span text:style-name="T1">how</text:span></text:span><text:span text:style-name="T1"> sequence information is aggregated. </text:span><text:span text:style-name="Strong_20_Emphasis"><text:span text:style-name="T1">Class-wise:</text:span></text:span><text:span text:style-name="T1"> the GRU gets </text:span><text:span text:style-name="Strong_20_Emphasis"><text:span text:style-name="T1">zero F1</text:span></text:span><text:span text:style-name="T1"> on several minority labels in this evaluation, while the Transformer recovers </text:span><text:span text:style-name="Strong_20_Emphasis"><text:span text:style-name="T1">non-zero</text:span></text:span><text:span text:style-name="T1"> signal on some of those </text:span><text:span text:style-name="Strong_20_Emphasis"><text:span text:style-name="T1">rare</text:span></text:span><text:span text:style-name="T1"> groups; </text:span><text:span text:style-name="Strong_20_Emphasis"><text:span text:style-name="T1">both</text:span></text:span><text:span text:style-name="T1"> still struggle on the </text:span><text:span text:style-name="Strong_20_Emphasis"><text:span text:style-name="T1">extremest tail</text:span></text:span><text:span text:style-name="T1"> classes where </text:span><text:span text:style-name="Strong_20_Emphasis"><text:span text:style-name="T1">test support is tiny</text:span></text:span><text:span text:style-name="T1">, so those F1s are </text:span><text:span text:style-name="Strong_20_Emphasis"><text:span text:style-name="T1">noisy</text:span></text:span><text:span text:style-name="T1">.</text:span></text:p>
      <text:p text:style-name="Text_20_body"><text:span text:style-name="T1">If the product goal is </text:span><text:span text:style-name="Strong_20_Emphasis"><text:span text:style-name="T1">overall correctness</text:span></text:span><text:span text:style-name="T1"> or </text:span><text:span text:style-name="Strong_20_Emphasis"><text:span text:style-name="T1">cheaper training</text:span></text:span><text:span text:style-name="T1">, the </text:span><text:span text:style-name="Strong_20_Emphasis"><text:span text:style-name="T1">GRU</text:span></text:span><text:span text:style-name="T1"> is preferable here. If the goal is </text:span><text:span text:style-name="Strong_20_Emphasis"><text:span text:style-name="T1">fairer performance across segments</text:span></text:span><text:span text:style-name="T1"> (minority classes matter), </text:span><text:span text:style-name="Strong_20_Emphasis"><text:span text:style-name="T1">macro-F1</text:span></text:span><text:span text:style-name="T1"> favors the </text:span><text:span text:style-name="Strong_20_Emphasis"><text:span text:style-name="T1">Transformer</text:span></text:span><text:span text:style-name="T1"> despite lower accuracy.</text:span></text:p>
      <text:h text:style-name="P1" text:outline-level="2"><text:soft-page-break/>Limitations and takeaways</text:h>
      <text:p text:style-name="Text_20_body"><text:span text:style-name="T1">Clusters are a </text:span><text:span text:style-name="Strong_20_Emphasis"><text:span text:style-name="T1">useful proxy</text:span></text:span><text:span text:style-name="T1">, not ground truth: labels inherit </text:span><text:span text:style-name="Strong_20_Emphasis"><text:span text:style-name="T1">imbalance</text:span></text:span><text:span text:style-name="T1"> and </text:span><text:span text:style-name="Strong_20_Emphasis"><text:span text:style-name="T1">algorithmic bias</text:span></text:span><text:span text:style-name="T1">. The latent </text:span><text:span text:style-name="Strong_20_Emphasis"><text:span text:style-name="T1">k = 6</text:span></text:span><text:span text:style-name="T1"> target is more </text:span><text:span text:style-name="Strong_20_Emphasis"><text:span text:style-name="T1">actionable</text:span></text:span><text:span text:style-name="T1"> than a </text:span><text:span text:style-name="Strong_20_Emphasis"><text:span text:style-name="T1">k = 2</text:span></text:span><text:span text:style-name="T1"> “everyone vs outliers” split on raw/sequence space, and the </text:span><text:span text:style-name="Strong_20_Emphasis"><text:span text:style-name="T1">hierarchical cross-check</text:span></text:span><text:span text:style-name="T1"> supports stability of that six-way structure. </text:span><text:span text:style-name="Strong_20_Emphasis"><text:span text:style-name="T1">Next steps</text:span></text:span><text:span text:style-name="T1"> that would strengthen claims without changing the core story: </text:span><text:span text:style-name="Strong_20_Emphasis"><text:span text:style-name="T1">rebalance or merge</text:span></text:span><text:span text:style-name="T1"> ultra-rare segments, and use </text:span><text:span text:style-name="Strong_20_Emphasis"><text:span text:style-name="T1">repeated splits or cross-validation</text:span></text:span><text:span text:style-name="T1"> to quantify variance especially for tail classes where a handful of test rows can move metrics a lot.</text:span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839in" fo:margin-right="0.47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0T22:40:57.491722094</meta:creation-date>
    <dc:date>2026-05-11T10:21:11.170365211</dc:date>
    <meta:editing-duration>PT10H12M1S</meta:editing-duration>
    <meta:editing-cycles>4</meta:editing-cycles>
    <meta:generator>LibreOffice/24.2.7.2$Linux_X86_64 LibreOffice_project/420$Build-2</meta:generator>
    <meta:print-date>2026-05-11T10:20:49.572959915</meta:print-date>
    <meta:printed-by>PDF files</meta:printed-by>
    <meta:document-statistic meta:table-count="1" meta:image-count="0" meta:object-count="0" meta:page-count="3" meta:paragraph-count="41" meta:word-count="1027" meta:character-count="6611" meta:non-whitespace-character-count="5633"/>
  </office:meta>
</office:document-meta>
</file>